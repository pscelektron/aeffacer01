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E8000003B8395080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 text:protected="true">
        <text:section-source xlink:href="../../Téléchargements/AKAI"/>
        <text:p text:style-name="Text_20_body"/>
      </text:section>
      <text:p text:style-name="Preformatted_20_Text">/home/dev/Téléchargements/AKAI<draw:frame draw:style-name="fr1" draw:name="Image1" text:anchor-type="char" svg:x="-3.261cm" svg:y="1.711cm" svg:width="19.212cm" svg:height="12.885cm" draw:z-index="0" draw:transform="translate (-6.345cm -8.1535cm) rotate (4.71238898038469) translate (6.345cm 8.1535cm)"><draw:image xlink:href="Pictures/10000000000004E8000003B8395080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9T20:04:19.570351849</dc:date>
    <meta:editing-duration>PT2M4S</meta:editing-duration>
    <meta:editing-cycles>1</meta:editing-cycles>
    <meta:document-statistic meta:table-count="0" meta:image-count="1" meta:object-count="0" meta:page-count="1" meta:paragraph-count="1" meta:word-count="1" meta:character-count="30" meta:non-whitespace-character-count="30"/>
    <meta:generator>LibreOffice/25.2.3.2$Linux_X86_64 LibreOffice_project/520$Build-2</meta:generator>
  </office:meta>
</office:document-meta>
</file>